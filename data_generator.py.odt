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9abe7" officeooo:paragraph-rsid="0009a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python</text:p>
      <text:p text:style-name="P1"/>
      <text:p text:style-name="P1">import sys</text:p>
      <text:p text:style-name="P1">import csv</text:p>
      <text:p text:style-name="P1">import random</text:p>
      <text:p text:style-name="P1">import time</text:p>
      <text:p text:style-name="P1">from multiprocessing import Process, Pipe</text:p>
      <text:p text:style-name="P1"/>
      <text:p text:style-name="P1">def help(arg):</text:p>
      <text:p text:style-name="P1"><text:s text:c="4"/>try:</text:p>
      <text:p text:style-name="P1"><text:s text:c="8"/>if len(arg) == 3:</text:p>
      <text:p text:style-name="P1"><text:s text:c="12"/>validate(sys.argv[1])</text:p>
      <text:p text:style-name="P1"><text:s text:c="12"/>validate(sys.argv[2])</text:p>
      <text:p text:style-name="P1"><text:s text:c="8"/>else:</text:p>
      <text:p text:style-name="P1"><text:s text:c="13"/>raise Exception('Insufficient number of arguments : Should be &lt;script&gt; startdate enddate')</text:p>
      <text:p text:style-name="P1"><text:s text:c="4"/>except Exception as ex:</text:p>
      <text:p text:style-name="P1"><text:s text:c="8"/>print(ex.args)</text:p>
      <text:p text:style-name="P1"/>
      <text:p text:style-name="P1">def validate(inp):</text:p>
      <text:p text:style-name="P1"><text:s text:c="4"/>try:</text:p>
      <text:p text:style-name="P1"><text:s text:c="8"/>time.strptime(inp,'%m/%d/%Y:%H:%M')</text:p>
      <text:p text:style-name="P1"><text:s text:c="4"/>except ValueError:</text:p>
      <text:p text:style-name="P1"><text:s text:c="8"/>raise ValueError("Incorrect format for date : Should be of format '%m/%d/%Y:%H:%M' [6/28/2016:13:30]")</text:p>
      <text:p text:style-name="P1"/>
      <text:p text:style-name="P1">def fun_timegen(start, end, format, period):</text:p>
      <text:p text:style-name="P1"/>
      <text:p text:style-name="P1"><text:s text:c="4"/>stime = time.mktime(time.strptime(start, format))</text:p>
      <text:p text:style-name="P1"><text:s text:c="4"/>etime = time.mktime(time.strptime(end, format))</text:p>
      <text:p text:style-name="P1"><text:s text:c="4"/>time_list = []</text:p>
      <text:p text:style-name="P1"/>
      <text:p text:style-name="P1"><text:s text:c="4"/>while (etime &gt; stime):</text:p>
      <text:p text:style-name="P1"/>
      <text:p text:style-name="P1"><text:s text:c="8"/>if period == "min":</text:p>
      <text:p text:style-name="P1"><text:s text:c="12"/>delta = 60</text:p>
      <text:p text:style-name="P1"><text:s text:c="8"/>else:</text:p>
      <text:p text:style-name="P1"><text:s text:c="12"/>delta = 60 * 60</text:p>
      <text:p text:style-name="P1"/>
      <text:p text:style-name="P1"><text:s text:c="8"/>dtime = stime + delta</text:p>
      <text:p text:style-name="P1"><text:s text:c="8"/>time_list.append(time.strftime(format, time.localtime(dtime)))</text:p>
      <text:p text:style-name="P1"/>
      <text:p text:style-name="P1"><text:s text:c="8"/>stime = stime + delta</text:p>
      <text:p text:style-name="P1"/>
      <text:p text:style-name="P1"><text:s text:c="4"/>return time_list</text:p>
      <text:p text:style-name="P1">def fun_time_between(start, end, period):</text:p>
      <text:p text:style-name="P1"><text:s text:c="4"/>return fun_timegen(start, end, '%m/%d/%Y:%H:%M', period)</text:p>
      <text:p text:style-name="P1"/>
      <text:p text:style-name="P1">def fun_month_abbr(date):</text:p>
      <text:p text:style-name="P1"><text:s text:c="4"/>return time.strftime('%b',time.strptime(date,'%m/%d/%Y:%H:%M'))</text:p>
      <text:p text:style-name="P1"/>
      <text:p text:style-name="P1"/>
      <text:p text:style-name="P1">def fun_temp_prd(tmp):</text:p>
      <text:p text:style-name="P1"><text:s text:c="4"/>return float(tmp) + random.uniform(-3,3)</text:p>
      <text:p text:style-name="P1"/>
      <text:p text:style-name="P1">def fun_cond_prd(tmp,rain,cloud):</text:p>
      <text:p text:style-name="P1"><text:s text:c="4"/>val = float(tmp) + float(rain) + float(cloud)</text:p>
      <text:p text:style-name="P1"><text:s text:c="4"/>final = random.gauss (val,round(float(rain),0))</text:p>
      <text:p text:style-name="P1"><text:s text:c="4"/>if final &gt; 35:</text:p>
      <text:p text:style-name="P1"><text:soft-page-break/><text:s text:c="8"/>return 'Sunny'</text:p>
      <text:p text:style-name="P1"><text:s text:c="4"/>elif final &gt; 30:</text:p>
      <text:p text:style-name="P1"><text:s text:c="8"/>return 'cloudy'</text:p>
      <text:p text:style-name="P1"><text:s text:c="4"/>elif final &lt; 20:</text:p>
      <text:p text:style-name="P1"><text:s text:c="8"/>return 'rainy'</text:p>
      <text:p text:style-name="P1"><text:s text:c="4"/>else:</text:p>
      <text:p text:style-name="P1"><text:s text:c="8"/>return <text:s/>'normal'</text:p>
      <text:p text:style-name="P1"/>
      <text:p text:style-name="P1">def create_csv(conn):</text:p>
      <text:p text:style-name="P1"><text:s text:c="4"/>try:</text:p>
      <text:p text:style-name="P1"><text:s text:c="8"/>with open('/home/ec2-user/misc/dimensions.dat','rb') as fr:</text:p>
      <text:p text:style-name="P1"><text:s text:c="12"/>f_dim_read = csv.reader(fr)</text:p>
      <text:p text:style-name="P1"><text:s text:c="12"/>dim_data_period = [ [y] + x for x in f_dim_read for y in fun_time_between(sys.argv[1], sys.argv[2], 'hr')]</text:p>
      <text:p text:style-name="P1"><text:s text:c="8"/>with open('/home/ec2-user/misc/mean_climate.dat','rb') as fr:</text:p>
      <text:p text:style-name="P1"><text:s text:c="12"/>f_clm_read = csv.reader(fr)</text:p>
      <text:p text:style-name="P1"><text:s text:c="12"/>conn.send ( [ i + [ fun_temp_prd(j[1]) ] + [ fun_temp_prd(j[2]) ] + [ fun_cond_prd(j[2],j[3],j[4]) ] + [ fun_temp_prd(j[5]) ] + [ fun_temp_prd ( 1000 + float(j[1])) ] for j in f_clm_read for i in dim_data_period if j[0] == fun_month_abbr(i[0]) ])</text:p>
      <text:p text:style-name="P1"><text:s text:c="12"/>conn.close</text:p>
      <text:p text:style-name="P1"/>
      <text:p text:style-name="P1"><text:s text:c="4"/>except Exception as err:</text:p>
      <text:p text:style-name="P1"/>
      <text:p text:style-name="P1"><text:s text:c="8"/>print "Failed for data :"</text:p>
      <text:p text:style-name="P1"><text:s text:c="8"/>print <text:s/>j</text:p>
      <text:p text:style-name="P1"><text:s text:c="8"/>print (err.args)</text:p>
      <text:p text:style-name="P1">starttime = time.clock()</text:p>
      <text:p text:style-name="P1"/>
      <text:p text:style-name="P1">help(sys.argv)</text:p>
      <text:p text:style-name="P1"/>
      <text:p text:style-name="P1">pipe_recv, pipe_send = Pipe()</text:p>
      <text:p text:style-name="P1">p = Process(target = create_csv, args = (pipe_send, ))</text:p>
      <text:p text:style-name="P1">with open('/home/ec2-user/misc/combined_data.csv','wb') as fw:</text:p>
      <text:p text:style-name="P1"><text:s text:c="4"/>f_csv_write = csv.writer(fw)</text:p>
      <text:p text:style-name="P1"><text:s text:c="4"/>p.start()</text:p>
      <text:p text:style-name="P1"><text:s text:c="4"/>for rows in pipe_recv.recv():</text:p>
      <text:p text:style-name="P1"><text:s text:c="8"/>f_csv_write.writerow(rows)</text:p>
      <text:p text:style-name="P1"><text:s text:c="8"/>p.join</text:p>
      <text:p text:style-name="P1"/>
      <text:p text:style-name="P1">#write_csv()</text:p>
      <text:p text:style-name="P1"/>
      <text:p text:style-name="P1"/>
      <text:p text:style-name="P1">runtime = time.clock() - starttime</text:p>
      <text:p text:style-name="P1">print "run time for generating data from " + sys.argv[1] + " to " + sys.argv[2] + " is " + str(runtime) + "minute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02:32:32.248000000</dc:date>
    <meta:editing-duration>PT2M4S</meta:editing-duration>
    <meta:editing-cycles>1</meta:editing-cycles>
    <meta:document-statistic meta:table-count="0" meta:image-count="0" meta:object-count="0" meta:page-count="2" meta:paragraph-count="76" meta:word-count="307" meta:character-count="2772" meta:non-whitespace-character-count="2158"/>
    <meta:generator>LibreOffice/4.3.2.2$Windows_x86 LibreOffice_project/edfb5295ba211bd31ad47d0bad0118690f76407d</meta:generator>
  </office:meta>
</office:document-meta>
</file>